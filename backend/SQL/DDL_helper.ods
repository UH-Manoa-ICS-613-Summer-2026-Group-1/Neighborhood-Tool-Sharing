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17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6.76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OBJECT NAME</text:p>
          </table:table-cell>
          <table:table-cell office:value-type="string">
            <text:p>COLUMN NAME</text:p>
          </table:table-cell>
          <table:table-cell office:value-type="string">
            <text:p>COMMENT</text:p>
          </table:table-cell>
          <table:table-cell office:value-type="string">
            <text:p>SQL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object_name</text:p>
          </table:table-cell>
          <table:table-cell office:value-type="string">
            <text:p>The name of the object (table, view, materialized view)</text:p>
          </table:table-cell>
          <table:table-cell table:formula="of:=&quot;COMMENT ON COLUMN &quot;&amp;[.A2]&amp;&quot;.&quot;&amp;[.B2]&amp;&quot; IS '&quot;&amp;SUBSTITUTE([.C2]; &quot;'&quot;; &quot;''&quot;)&amp;&quot;';&quot;" office:value-type="string" office:string-value="COMMENT ON COLUMN DATA_DICTIONARY_OBJECTS_V.object_name IS 'The name of the object (table, view, materialized view)';">
            <text:p>COMMENT ON COLUMN DATA_DICTIONARY_OBJECTS_V.object_name IS 'The name of the object (table, view, materialized view)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object_description</text:p>
          </table:table-cell>
          <table:table-cell office:value-type="string">
            <text:p>The object's description</text:p>
          </table:table-cell>
          <table:table-cell table:formula="of:=&quot;COMMENT ON COLUMN &quot;&amp;[.A3]&amp;&quot;.&quot;&amp;[.B3]&amp;&quot; IS '&quot;&amp;SUBSTITUTE([.C3]; &quot;'&quot;; &quot;''&quot;)&amp;&quot;';&quot;" office:value-type="string" office:string-value="COMMENT ON COLUMN DATA_DICTIONARY_OBJECTS_V.object_description IS 'The object''s description';">
            <text:p>COMMENT ON COLUMN DATA_DICTIONARY_OBJECTS_V.object_description IS 'The object''s description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column_position</text:p>
          </table:table-cell>
          <table:table-cell office:value-type="string">
            <text:p>The relative column position with respect to the object</text:p>
          </table:table-cell>
          <table:table-cell table:formula="of:=&quot;COMMENT ON COLUMN &quot;&amp;[.A4]&amp;&quot;.&quot;&amp;[.B4]&amp;&quot; IS '&quot;&amp;SUBSTITUTE([.C4]; &quot;'&quot;; &quot;''&quot;)&amp;&quot;';&quot;" office:value-type="string" office:string-value="COMMENT ON COLUMN DATA_DICTIONARY_OBJECTS_V.column_position IS 'The relative column position with respect to the object';">
            <text:p>COMMENT ON COLUMN DATA_DICTIONARY_OBJECTS_V.column_position IS 'The relative column position with respect to the object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is_primary_key</text:p>
          </table:table-cell>
          <table:table-cell office:value-type="string">
            <text:p>A boolean column to indicate if the corresponding column_name is a primary key column (true) or not (false)</text:p>
          </table:table-cell>
          <table:table-cell table:formula="of:=&quot;COMMENT ON COLUMN &quot;&amp;[.A5]&amp;&quot;.&quot;&amp;[.B5]&amp;&quot; IS '&quot;&amp;SUBSTITUTE([.C5]; &quot;'&quot;; &quot;''&quot;)&amp;&quot;';&quot;" office:value-type="string" office:string-value="COMMENT ON COLUMN DATA_DICTIONARY_OBJECTS_V.is_primary_key IS 'A boolean column to indicate if the corresponding column_name is a primary key column (true) or not (false)';">
            <text:p>COMMENT ON COLUMN DATA_DICTIONARY_OBJECTS_V.is_primary_key IS 'A boolean column to indicate if the corresponding column_name is a primary key column (true) or not (false)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data_type</text:p>
          </table:table-cell>
          <table:table-cell office:value-type="string">
            <text:p>The column data type</text:p>
          </table:table-cell>
          <table:table-cell table:formula="of:=&quot;COMMENT ON COLUMN &quot;&amp;[.A6]&amp;&quot;.&quot;&amp;[.B6]&amp;&quot; IS '&quot;&amp;SUBSTITUTE([.C6]; &quot;'&quot;; &quot;''&quot;)&amp;&quot;';&quot;" office:value-type="string" office:string-value="COMMENT ON COLUMN DATA_DICTIONARY_OBJECTS_V.data_type IS 'The column data type';">
            <text:p>COMMENT ON COLUMN DATA_DICTIONARY_OBJECTS_V.data_type IS 'The column data type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is_nullable</text:p>
          </table:table-cell>
          <table:table-cell office:value-type="string">
            <text:p>A boolean column to indicate if the corresponding column can container null (true) or not (false)</text:p>
          </table:table-cell>
          <table:table-cell table:formula="of:=&quot;COMMENT ON COLUMN &quot;&amp;[.A7]&amp;&quot;.&quot;&amp;[.B7]&amp;&quot; IS '&quot;&amp;SUBSTITUTE([.C7]; &quot;'&quot;; &quot;''&quot;)&amp;&quot;';&quot;" office:value-type="string" office:string-value="COMMENT ON COLUMN DATA_DICTIONARY_OBJECTS_V.is_nullable IS 'A boolean column to indicate if the corresponding column can container null (true) or not (false)';">
            <text:p>COMMENT ON COLUMN DATA_DICTIONARY_OBJECTS_V.is_nullable IS 'A boolean column to indicate if the corresponding column can container null (true) or not (false)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is_identity</text:p>
          </table:table-cell>
          <table:table-cell office:value-type="string">
            <text:p>A boolean column to indicate if the corresponding column is an identity column (true) or not (false)</text:p>
          </table:table-cell>
          <table:table-cell table:formula="of:=&quot;COMMENT ON COLUMN &quot;&amp;[.A8]&amp;&quot;.&quot;&amp;[.B8]&amp;&quot; IS '&quot;&amp;SUBSTITUTE([.C8]; &quot;'&quot;; &quot;''&quot;)&amp;&quot;';&quot;" office:value-type="string" office:string-value="COMMENT ON COLUMN DATA_DICTIONARY_OBJECTS_V.is_identity IS 'A boolean column to indicate if the corresponding column is an identity column (true) or not (false)';">
            <text:p>COMMENT ON COLUMN DATA_DICTIONARY_OBJECTS_V.is_identity IS 'A boolean column to indicate if the corresponding column is an identity column (true) or not (false)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column_default</text:p>
          </table:table-cell>
          <table:table-cell office:value-type="string">
            <text:p>The default value for the column</text:p>
          </table:table-cell>
          <table:table-cell table:formula="of:=&quot;COMMENT ON COLUMN &quot;&amp;[.A9]&amp;&quot;.&quot;&amp;[.B9]&amp;&quot; IS '&quot;&amp;SUBSTITUTE([.C9]; &quot;'&quot;; &quot;''&quot;)&amp;&quot;';&quot;" office:value-type="string" office:string-value="COMMENT ON COLUMN DATA_DICTIONARY_OBJECTS_V.column_default IS 'The default value for the column';">
            <text:p>COMMENT ON COLUMN DATA_DICTIONARY_OBJECTS_V.column_default IS 'The default value for the column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column_description</text:p>
          </table:table-cell>
          <table:table-cell office:value-type="string">
            <text:p>The column's description</text:p>
          </table:table-cell>
          <table:table-cell table:formula="of:=&quot;COMMENT ON COLUMN &quot;&amp;[.A10]&amp;&quot;.&quot;&amp;[.B10]&amp;&quot; IS '&quot;&amp;SUBSTITUTE([.C10]; &quot;'&quot;; &quot;''&quot;)&amp;&quot;';&quot;" office:value-type="string" office:string-value="COMMENT ON COLUMN DATA_DICTIONARY_OBJECTS_V.column_description IS 'The column''s description';">
            <text:p>COMMENT ON COLUMN DATA_DICTIONARY_OBJECTS_V.column_description IS 'The column''s description';</text:p>
          </table:table-cell>
        </table:table-row>
        <table:table-row table:style-name="ro1">
          <table:table-cell office:value-type="string">
            <text:p>DATA_DICTIONARY_OBJECTS_V</text:p>
          </table:table-cell>
          <table:table-cell office:value-type="string">
            <text:p>column_name</text:p>
          </table:table-cell>
          <table:table-cell office:value-type="string">
            <text:p>The column's name</text:p>
          </table:table-cell>
          <table:table-cell table:formula="of:=&quot;COMMENT ON COLUMN &quot;&amp;[.A11]&amp;&quot;.&quot;&amp;[.B11]&amp;&quot; IS '&quot;&amp;SUBSTITUTE([.C11]; &quot;'&quot;; &quot;''&quot;)&amp;&quot;';&quot;" office:value-type="string" office:string-value="COMMENT ON COLUMN DATA_DICTIONARY_OBJECTS_V.column_name IS 'The column''s name';">
            <text:p>COMMENT ON COLUMN DATA_DICTIONARY_OBJECTS_V.column_name IS 'The column''s name';</text:p>
          </table:table-cell>
        </table:table-row>
        <table:table-row table:style-name="ro1">
          <table:table-cell office:value-type="string">
            <text:p>data_dictionary_relationships_v</text:p>
          </table:table-cell>
          <table:table-cell office:value-type="string">
            <text:p>source_table</text:p>
          </table:table-cell>
          <table:table-cell office:value-type="string">
            <text:p>The name of the source table that references the referenced_table</text:p>
          </table:table-cell>
          <table:table-cell table:formula="of:=&quot;COMMENT ON COLUMN &quot;&amp;[.A12]&amp;&quot;.&quot;&amp;[.B12]&amp;&quot; IS '&quot;&amp;SUBSTITUTE([.C12]; &quot;'&quot;; &quot;''&quot;)&amp;&quot;';&quot;" office:value-type="string" office:string-value="COMMENT ON COLUMN data_dictionary_relationships_v.source_table IS 'The name of the source table that references the referenced_table';">
            <text:p>COMMENT ON COLUMN data_dictionary_relationships_v.source_table IS 'The name of the source table that references the referenced_table';</text:p>
          </table:table-cell>
        </table:table-row>
        <table:table-row table:style-name="ro1">
          <table:table-cell office:value-type="string">
            <text:p>data_dictionary_relationships_v</text:p>
          </table:table-cell>
          <table:table-cell office:value-type="string">
            <text:p>source_column</text:p>
          </table:table-cell>
          <table:table-cell office:value-type="string">
            <text:p>The name of the source table column that references the referenced_column in the referenced_table</text:p>
          </table:table-cell>
          <table:table-cell table:formula="of:=&quot;COMMENT ON COLUMN &quot;&amp;[.A13]&amp;&quot;.&quot;&amp;[.B13]&amp;&quot; IS '&quot;&amp;SUBSTITUTE([.C13]; &quot;'&quot;; &quot;''&quot;)&amp;&quot;';&quot;" office:value-type="string" office:string-value="COMMENT ON COLUMN data_dictionary_relationships_v.source_column IS 'The name of the source table column that references the referenced_column in the referenced_table';">
            <text:p>COMMENT ON COLUMN data_dictionary_relationships_v.source_column IS 'The name of the source table column that references the referenced_column in the referenced_table';</text:p>
          </table:table-cell>
        </table:table-row>
        <table:table-row table:style-name="ro1">
          <table:table-cell office:value-type="string">
            <text:p>data_dictionary_relationships_v</text:p>
          </table:table-cell>
          <table:table-cell office:value-type="string">
            <text:p>foreign_key_name</text:p>
          </table:table-cell>
          <table:table-cell office:value-type="string">
            <text:p>The name of the foreign key constraint name defined in the source_table</text:p>
          </table:table-cell>
          <table:table-cell table:formula="of:=&quot;COMMENT ON COLUMN &quot;&amp;[.A14]&amp;&quot;.&quot;&amp;[.B14]&amp;&quot; IS '&quot;&amp;SUBSTITUTE([.C14]; &quot;'&quot;; &quot;''&quot;)&amp;&quot;';&quot;" office:value-type="string" office:string-value="COMMENT ON COLUMN data_dictionary_relationships_v.foreign_key_name IS 'The name of the foreign key constraint name defined in the source_table';">
            <text:p>COMMENT ON COLUMN data_dictionary_relationships_v.foreign_key_name IS 'The name of the foreign key constraint name defined in the source_table';</text:p>
          </table:table-cell>
        </table:table-row>
        <table:table-row table:style-name="ro1">
          <table:table-cell office:value-type="string">
            <text:p>data_dictionary_relationships_v</text:p>
          </table:table-cell>
          <table:table-cell office:value-type="string">
            <text:p>referenced_table</text:p>
          </table:table-cell>
          <table:table-cell office:value-type="string">
            <text:p>The name of the table that is referenced by the source_table's foreign key constraint</text:p>
          </table:table-cell>
          <table:table-cell table:formula="of:=&quot;COMMENT ON COLUMN &quot;&amp;[.A15]&amp;&quot;.&quot;&amp;[.B15]&amp;&quot; IS '&quot;&amp;SUBSTITUTE([.C15]; &quot;'&quot;; &quot;''&quot;)&amp;&quot;';&quot;" office:value-type="string" office:string-value="COMMENT ON COLUMN data_dictionary_relationships_v.referenced_table IS 'The name of the table that is referenced by the source_table''s foreign key constraint';">
            <text:p>COMMENT ON COLUMN data_dictionary_relationships_v.referenced_table IS 'The name of the table that is referenced by the source_table''s foreign key constraint';</text:p>
          </table:table-cell>
        </table:table-row>
        <table:table-row table:style-name="ro1">
          <table:table-cell office:value-type="string">
            <text:p>data_dictionary_relationships_v</text:p>
          </table:table-cell>
          <table:table-cell office:value-type="string">
            <text:p>referenced_column</text:p>
          </table:table-cell>
          <table:table-cell office:value-type="string">
            <text:p>The name of the table column that is referenced by the source_table's source_column foreign key constraint</text:p>
          </table:table-cell>
          <table:table-cell table:formula="of:=&quot;COMMENT ON COLUMN &quot;&amp;[.A16]&amp;&quot;.&quot;&amp;[.B16]&amp;&quot; IS '&quot;&amp;SUBSTITUTE([.C16]; &quot;'&quot;; &quot;''&quot;)&amp;&quot;';&quot;" office:value-type="string" office:string-value="COMMENT ON COLUMN data_dictionary_relationships_v.referenced_column IS 'The name of the table column that is referenced by the source_table''s source_column foreign key constraint';">
            <text:p>COMMENT ON COLUMN data_dictionary_relationships_v.referenced_column IS 'The name of the table column that is referenced by the source_table''s source_column foreign key constraint';</text:p>
          </table:table-cell>
        </table:table-row>
        <table:table-row table:style-name="ro1">
          <table:table-cell table:number-columns-repeated="3"/>
          <table:table-cell table:formula="of:=&quot;COMMENT ON COLUMN &quot;&amp;[.A17]&amp;&quot;.&quot;&amp;[.B17]&amp;&quot; IS '&quot;&amp;SUBSTITUTE([.C1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]&amp;&quot;.&quot;&amp;[.B18]&amp;&quot; IS '&quot;&amp;SUBSTITUTE([.C1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]&amp;&quot;.&quot;&amp;[.B19]&amp;&quot; IS '&quot;&amp;SUBSTITUTE([.C1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0]&amp;&quot;.&quot;&amp;[.B20]&amp;&quot; IS '&quot;&amp;SUBSTITUTE([.C2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1]&amp;&quot;.&quot;&amp;[.B21]&amp;&quot; IS '&quot;&amp;SUBSTITUTE([.C2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2]&amp;&quot;.&quot;&amp;[.B22]&amp;&quot; IS '&quot;&amp;SUBSTITUTE([.C2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3]&amp;&quot;.&quot;&amp;[.B23]&amp;&quot; IS '&quot;&amp;SUBSTITUTE([.C2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4]&amp;&quot;.&quot;&amp;[.B24]&amp;&quot; IS '&quot;&amp;SUBSTITUTE([.C2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5]&amp;&quot;.&quot;&amp;[.B25]&amp;&quot; IS '&quot;&amp;SUBSTITUTE([.C2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6]&amp;&quot;.&quot;&amp;[.B26]&amp;&quot; IS '&quot;&amp;SUBSTITUTE([.C2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7]&amp;&quot;.&quot;&amp;[.B27]&amp;&quot; IS '&quot;&amp;SUBSTITUTE([.C2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8]&amp;&quot;.&quot;&amp;[.B28]&amp;&quot; IS '&quot;&amp;SUBSTITUTE([.C2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9]&amp;&quot;.&quot;&amp;[.B29]&amp;&quot; IS '&quot;&amp;SUBSTITUTE([.C2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0]&amp;&quot;.&quot;&amp;[.B30]&amp;&quot; IS '&quot;&amp;SUBSTITUTE([.C3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1]&amp;&quot;.&quot;&amp;[.B31]&amp;&quot; IS '&quot;&amp;SUBSTITUTE([.C3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2]&amp;&quot;.&quot;&amp;[.B32]&amp;&quot; IS '&quot;&amp;SUBSTITUTE([.C3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3]&amp;&quot;.&quot;&amp;[.B33]&amp;&quot; IS '&quot;&amp;SUBSTITUTE([.C3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4]&amp;&quot;.&quot;&amp;[.B34]&amp;&quot; IS '&quot;&amp;SUBSTITUTE([.C3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5]&amp;&quot;.&quot;&amp;[.B35]&amp;&quot; IS '&quot;&amp;SUBSTITUTE([.C3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6]&amp;&quot;.&quot;&amp;[.B36]&amp;&quot; IS '&quot;&amp;SUBSTITUTE([.C3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7]&amp;&quot;.&quot;&amp;[.B37]&amp;&quot; IS '&quot;&amp;SUBSTITUTE([.C3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8]&amp;&quot;.&quot;&amp;[.B38]&amp;&quot; IS '&quot;&amp;SUBSTITUTE([.C3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39]&amp;&quot;.&quot;&amp;[.B39]&amp;&quot; IS '&quot;&amp;SUBSTITUTE([.C3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0]&amp;&quot;.&quot;&amp;[.B40]&amp;&quot; IS '&quot;&amp;SUBSTITUTE([.C4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1]&amp;&quot;.&quot;&amp;[.B41]&amp;&quot; IS '&quot;&amp;SUBSTITUTE([.C4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2]&amp;&quot;.&quot;&amp;[.B42]&amp;&quot; IS '&quot;&amp;SUBSTITUTE([.C4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3]&amp;&quot;.&quot;&amp;[.B43]&amp;&quot; IS '&quot;&amp;SUBSTITUTE([.C4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4]&amp;&quot;.&quot;&amp;[.B44]&amp;&quot; IS '&quot;&amp;SUBSTITUTE([.C4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5]&amp;&quot;.&quot;&amp;[.B45]&amp;&quot; IS '&quot;&amp;SUBSTITUTE([.C4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6]&amp;&quot;.&quot;&amp;[.B46]&amp;&quot; IS '&quot;&amp;SUBSTITUTE([.C4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7]&amp;&quot;.&quot;&amp;[.B47]&amp;&quot; IS '&quot;&amp;SUBSTITUTE([.C4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8]&amp;&quot;.&quot;&amp;[.B48]&amp;&quot; IS '&quot;&amp;SUBSTITUTE([.C4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49]&amp;&quot;.&quot;&amp;[.B49]&amp;&quot; IS '&quot;&amp;SUBSTITUTE([.C4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0]&amp;&quot;.&quot;&amp;[.B50]&amp;&quot; IS '&quot;&amp;SUBSTITUTE([.C5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1]&amp;&quot;.&quot;&amp;[.B51]&amp;&quot; IS '&quot;&amp;SUBSTITUTE([.C5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2]&amp;&quot;.&quot;&amp;[.B52]&amp;&quot; IS '&quot;&amp;SUBSTITUTE([.C5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3]&amp;&quot;.&quot;&amp;[.B53]&amp;&quot; IS '&quot;&amp;SUBSTITUTE([.C5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4]&amp;&quot;.&quot;&amp;[.B54]&amp;&quot; IS '&quot;&amp;SUBSTITUTE([.C5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5]&amp;&quot;.&quot;&amp;[.B55]&amp;&quot; IS '&quot;&amp;SUBSTITUTE([.C5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6]&amp;&quot;.&quot;&amp;[.B56]&amp;&quot; IS '&quot;&amp;SUBSTITUTE([.C5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7]&amp;&quot;.&quot;&amp;[.B57]&amp;&quot; IS '&quot;&amp;SUBSTITUTE([.C5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8]&amp;&quot;.&quot;&amp;[.B58]&amp;&quot; IS '&quot;&amp;SUBSTITUTE([.C5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59]&amp;&quot;.&quot;&amp;[.B59]&amp;&quot; IS '&quot;&amp;SUBSTITUTE([.C5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0]&amp;&quot;.&quot;&amp;[.B60]&amp;&quot; IS '&quot;&amp;SUBSTITUTE([.C6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1]&amp;&quot;.&quot;&amp;[.B61]&amp;&quot; IS '&quot;&amp;SUBSTITUTE([.C6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2]&amp;&quot;.&quot;&amp;[.B62]&amp;&quot; IS '&quot;&amp;SUBSTITUTE([.C6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3]&amp;&quot;.&quot;&amp;[.B63]&amp;&quot; IS '&quot;&amp;SUBSTITUTE([.C6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4]&amp;&quot;.&quot;&amp;[.B64]&amp;&quot; IS '&quot;&amp;SUBSTITUTE([.C6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5]&amp;&quot;.&quot;&amp;[.B65]&amp;&quot; IS '&quot;&amp;SUBSTITUTE([.C6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6]&amp;&quot;.&quot;&amp;[.B66]&amp;&quot; IS '&quot;&amp;SUBSTITUTE([.C6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7]&amp;&quot;.&quot;&amp;[.B67]&amp;&quot; IS '&quot;&amp;SUBSTITUTE([.C6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8]&amp;&quot;.&quot;&amp;[.B68]&amp;&quot; IS '&quot;&amp;SUBSTITUTE([.C6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69]&amp;&quot;.&quot;&amp;[.B69]&amp;&quot; IS '&quot;&amp;SUBSTITUTE([.C6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0]&amp;&quot;.&quot;&amp;[.B70]&amp;&quot; IS '&quot;&amp;SUBSTITUTE([.C7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1]&amp;&quot;.&quot;&amp;[.B71]&amp;&quot; IS '&quot;&amp;SUBSTITUTE([.C7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2]&amp;&quot;.&quot;&amp;[.B72]&amp;&quot; IS '&quot;&amp;SUBSTITUTE([.C7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3]&amp;&quot;.&quot;&amp;[.B73]&amp;&quot; IS '&quot;&amp;SUBSTITUTE([.C7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4]&amp;&quot;.&quot;&amp;[.B74]&amp;&quot; IS '&quot;&amp;SUBSTITUTE([.C7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5]&amp;&quot;.&quot;&amp;[.B75]&amp;&quot; IS '&quot;&amp;SUBSTITUTE([.C7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6]&amp;&quot;.&quot;&amp;[.B76]&amp;&quot; IS '&quot;&amp;SUBSTITUTE([.C7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7]&amp;&quot;.&quot;&amp;[.B77]&amp;&quot; IS '&quot;&amp;SUBSTITUTE([.C7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8]&amp;&quot;.&quot;&amp;[.B78]&amp;&quot; IS '&quot;&amp;SUBSTITUTE([.C7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79]&amp;&quot;.&quot;&amp;[.B79]&amp;&quot; IS '&quot;&amp;SUBSTITUTE([.C7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0]&amp;&quot;.&quot;&amp;[.B80]&amp;&quot; IS '&quot;&amp;SUBSTITUTE([.C8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1]&amp;&quot;.&quot;&amp;[.B81]&amp;&quot; IS '&quot;&amp;SUBSTITUTE([.C8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2]&amp;&quot;.&quot;&amp;[.B82]&amp;&quot; IS '&quot;&amp;SUBSTITUTE([.C8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3]&amp;&quot;.&quot;&amp;[.B83]&amp;&quot; IS '&quot;&amp;SUBSTITUTE([.C8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4]&amp;&quot;.&quot;&amp;[.B84]&amp;&quot; IS '&quot;&amp;SUBSTITUTE([.C8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5]&amp;&quot;.&quot;&amp;[.B85]&amp;&quot; IS '&quot;&amp;SUBSTITUTE([.C8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6]&amp;&quot;.&quot;&amp;[.B86]&amp;&quot; IS '&quot;&amp;SUBSTITUTE([.C8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7]&amp;&quot;.&quot;&amp;[.B87]&amp;&quot; IS '&quot;&amp;SUBSTITUTE([.C8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8]&amp;&quot;.&quot;&amp;[.B88]&amp;&quot; IS '&quot;&amp;SUBSTITUTE([.C8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89]&amp;&quot;.&quot;&amp;[.B89]&amp;&quot; IS '&quot;&amp;SUBSTITUTE([.C8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0]&amp;&quot;.&quot;&amp;[.B90]&amp;&quot; IS '&quot;&amp;SUBSTITUTE([.C9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1]&amp;&quot;.&quot;&amp;[.B91]&amp;&quot; IS '&quot;&amp;SUBSTITUTE([.C9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2]&amp;&quot;.&quot;&amp;[.B92]&amp;&quot; IS '&quot;&amp;SUBSTITUTE([.C9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3]&amp;&quot;.&quot;&amp;[.B93]&amp;&quot; IS '&quot;&amp;SUBSTITUTE([.C9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4]&amp;&quot;.&quot;&amp;[.B94]&amp;&quot; IS '&quot;&amp;SUBSTITUTE([.C9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5]&amp;&quot;.&quot;&amp;[.B95]&amp;&quot; IS '&quot;&amp;SUBSTITUTE([.C9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6]&amp;&quot;.&quot;&amp;[.B96]&amp;&quot; IS '&quot;&amp;SUBSTITUTE([.C9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7]&amp;&quot;.&quot;&amp;[.B97]&amp;&quot; IS '&quot;&amp;SUBSTITUTE([.C9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8]&amp;&quot;.&quot;&amp;[.B98]&amp;&quot; IS '&quot;&amp;SUBSTITUTE([.C9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99]&amp;&quot;.&quot;&amp;[.B99]&amp;&quot; IS '&quot;&amp;SUBSTITUTE([.C9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0]&amp;&quot;.&quot;&amp;[.B100]&amp;&quot; IS '&quot;&amp;SUBSTITUTE([.C10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1]&amp;&quot;.&quot;&amp;[.B101]&amp;&quot; IS '&quot;&amp;SUBSTITUTE([.C10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2]&amp;&quot;.&quot;&amp;[.B102]&amp;&quot; IS '&quot;&amp;SUBSTITUTE([.C10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3]&amp;&quot;.&quot;&amp;[.B103]&amp;&quot; IS '&quot;&amp;SUBSTITUTE([.C10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4]&amp;&quot;.&quot;&amp;[.B104]&amp;&quot; IS '&quot;&amp;SUBSTITUTE([.C10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5]&amp;&quot;.&quot;&amp;[.B105]&amp;&quot; IS '&quot;&amp;SUBSTITUTE([.C10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6]&amp;&quot;.&quot;&amp;[.B106]&amp;&quot; IS '&quot;&amp;SUBSTITUTE([.C10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7]&amp;&quot;.&quot;&amp;[.B107]&amp;&quot; IS '&quot;&amp;SUBSTITUTE([.C10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8]&amp;&quot;.&quot;&amp;[.B108]&amp;&quot; IS '&quot;&amp;SUBSTITUTE([.C10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09]&amp;&quot;.&quot;&amp;[.B109]&amp;&quot; IS '&quot;&amp;SUBSTITUTE([.C10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0]&amp;&quot;.&quot;&amp;[.B110]&amp;&quot; IS '&quot;&amp;SUBSTITUTE([.C11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1]&amp;&quot;.&quot;&amp;[.B111]&amp;&quot; IS '&quot;&amp;SUBSTITUTE([.C11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2]&amp;&quot;.&quot;&amp;[.B112]&amp;&quot; IS '&quot;&amp;SUBSTITUTE([.C11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3]&amp;&quot;.&quot;&amp;[.B113]&amp;&quot; IS '&quot;&amp;SUBSTITUTE([.C11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4]&amp;&quot;.&quot;&amp;[.B114]&amp;&quot; IS '&quot;&amp;SUBSTITUTE([.C11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5]&amp;&quot;.&quot;&amp;[.B115]&amp;&quot; IS '&quot;&amp;SUBSTITUTE([.C11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6]&amp;&quot;.&quot;&amp;[.B116]&amp;&quot; IS '&quot;&amp;SUBSTITUTE([.C11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7]&amp;&quot;.&quot;&amp;[.B117]&amp;&quot; IS '&quot;&amp;SUBSTITUTE([.C11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8]&amp;&quot;.&quot;&amp;[.B118]&amp;&quot; IS '&quot;&amp;SUBSTITUTE([.C11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19]&amp;&quot;.&quot;&amp;[.B119]&amp;&quot; IS '&quot;&amp;SUBSTITUTE([.C11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0]&amp;&quot;.&quot;&amp;[.B120]&amp;&quot; IS '&quot;&amp;SUBSTITUTE([.C12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1]&amp;&quot;.&quot;&amp;[.B121]&amp;&quot; IS '&quot;&amp;SUBSTITUTE([.C12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2]&amp;&quot;.&quot;&amp;[.B122]&amp;&quot; IS '&quot;&amp;SUBSTITUTE([.C12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3]&amp;&quot;.&quot;&amp;[.B123]&amp;&quot; IS '&quot;&amp;SUBSTITUTE([.C12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4]&amp;&quot;.&quot;&amp;[.B124]&amp;&quot; IS '&quot;&amp;SUBSTITUTE([.C12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5]&amp;&quot;.&quot;&amp;[.B125]&amp;&quot; IS '&quot;&amp;SUBSTITUTE([.C12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6]&amp;&quot;.&quot;&amp;[.B126]&amp;&quot; IS '&quot;&amp;SUBSTITUTE([.C12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7]&amp;&quot;.&quot;&amp;[.B127]&amp;&quot; IS '&quot;&amp;SUBSTITUTE([.C12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8]&amp;&quot;.&quot;&amp;[.B128]&amp;&quot; IS '&quot;&amp;SUBSTITUTE([.C12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29]&amp;&quot;.&quot;&amp;[.B129]&amp;&quot; IS '&quot;&amp;SUBSTITUTE([.C12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0]&amp;&quot;.&quot;&amp;[.B130]&amp;&quot; IS '&quot;&amp;SUBSTITUTE([.C13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1]&amp;&quot;.&quot;&amp;[.B131]&amp;&quot; IS '&quot;&amp;SUBSTITUTE([.C13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2]&amp;&quot;.&quot;&amp;[.B132]&amp;&quot; IS '&quot;&amp;SUBSTITUTE([.C13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3]&amp;&quot;.&quot;&amp;[.B133]&amp;&quot; IS '&quot;&amp;SUBSTITUTE([.C13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4]&amp;&quot;.&quot;&amp;[.B134]&amp;&quot; IS '&quot;&amp;SUBSTITUTE([.C13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5]&amp;&quot;.&quot;&amp;[.B135]&amp;&quot; IS '&quot;&amp;SUBSTITUTE([.C13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6]&amp;&quot;.&quot;&amp;[.B136]&amp;&quot; IS '&quot;&amp;SUBSTITUTE([.C13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7]&amp;&quot;.&quot;&amp;[.B137]&amp;&quot; IS '&quot;&amp;SUBSTITUTE([.C13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8]&amp;&quot;.&quot;&amp;[.B138]&amp;&quot; IS '&quot;&amp;SUBSTITUTE([.C13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39]&amp;&quot;.&quot;&amp;[.B139]&amp;&quot; IS '&quot;&amp;SUBSTITUTE([.C13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0]&amp;&quot;.&quot;&amp;[.B140]&amp;&quot; IS '&quot;&amp;SUBSTITUTE([.C14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1]&amp;&quot;.&quot;&amp;[.B141]&amp;&quot; IS '&quot;&amp;SUBSTITUTE([.C14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2]&amp;&quot;.&quot;&amp;[.B142]&amp;&quot; IS '&quot;&amp;SUBSTITUTE([.C14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3]&amp;&quot;.&quot;&amp;[.B143]&amp;&quot; IS '&quot;&amp;SUBSTITUTE([.C14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4]&amp;&quot;.&quot;&amp;[.B144]&amp;&quot; IS '&quot;&amp;SUBSTITUTE([.C14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5]&amp;&quot;.&quot;&amp;[.B145]&amp;&quot; IS '&quot;&amp;SUBSTITUTE([.C14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6]&amp;&quot;.&quot;&amp;[.B146]&amp;&quot; IS '&quot;&amp;SUBSTITUTE([.C14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7]&amp;&quot;.&quot;&amp;[.B147]&amp;&quot; IS '&quot;&amp;SUBSTITUTE([.C14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8]&amp;&quot;.&quot;&amp;[.B148]&amp;&quot; IS '&quot;&amp;SUBSTITUTE([.C14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49]&amp;&quot;.&quot;&amp;[.B149]&amp;&quot; IS '&quot;&amp;SUBSTITUTE([.C14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0]&amp;&quot;.&quot;&amp;[.B150]&amp;&quot; IS '&quot;&amp;SUBSTITUTE([.C15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1]&amp;&quot;.&quot;&amp;[.B151]&amp;&quot; IS '&quot;&amp;SUBSTITUTE([.C15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2]&amp;&quot;.&quot;&amp;[.B152]&amp;&quot; IS '&quot;&amp;SUBSTITUTE([.C15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3]&amp;&quot;.&quot;&amp;[.B153]&amp;&quot; IS '&quot;&amp;SUBSTITUTE([.C15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4]&amp;&quot;.&quot;&amp;[.B154]&amp;&quot; IS '&quot;&amp;SUBSTITUTE([.C15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5]&amp;&quot;.&quot;&amp;[.B155]&amp;&quot; IS '&quot;&amp;SUBSTITUTE([.C15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6]&amp;&quot;.&quot;&amp;[.B156]&amp;&quot; IS '&quot;&amp;SUBSTITUTE([.C15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7]&amp;&quot;.&quot;&amp;[.B157]&amp;&quot; IS '&quot;&amp;SUBSTITUTE([.C15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8]&amp;&quot;.&quot;&amp;[.B158]&amp;&quot; IS '&quot;&amp;SUBSTITUTE([.C15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59]&amp;&quot;.&quot;&amp;[.B159]&amp;&quot; IS '&quot;&amp;SUBSTITUTE([.C15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0]&amp;&quot;.&quot;&amp;[.B160]&amp;&quot; IS '&quot;&amp;SUBSTITUTE([.C16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1]&amp;&quot;.&quot;&amp;[.B161]&amp;&quot; IS '&quot;&amp;SUBSTITUTE([.C16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2]&amp;&quot;.&quot;&amp;[.B162]&amp;&quot; IS '&quot;&amp;SUBSTITUTE([.C16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3]&amp;&quot;.&quot;&amp;[.B163]&amp;&quot; IS '&quot;&amp;SUBSTITUTE([.C16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4]&amp;&quot;.&quot;&amp;[.B164]&amp;&quot; IS '&quot;&amp;SUBSTITUTE([.C16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5]&amp;&quot;.&quot;&amp;[.B165]&amp;&quot; IS '&quot;&amp;SUBSTITUTE([.C16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6]&amp;&quot;.&quot;&amp;[.B166]&amp;&quot; IS '&quot;&amp;SUBSTITUTE([.C16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7]&amp;&quot;.&quot;&amp;[.B167]&amp;&quot; IS '&quot;&amp;SUBSTITUTE([.C16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8]&amp;&quot;.&quot;&amp;[.B168]&amp;&quot; IS '&quot;&amp;SUBSTITUTE([.C16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69]&amp;&quot;.&quot;&amp;[.B169]&amp;&quot; IS '&quot;&amp;SUBSTITUTE([.C16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0]&amp;&quot;.&quot;&amp;[.B170]&amp;&quot; IS '&quot;&amp;SUBSTITUTE([.C17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1]&amp;&quot;.&quot;&amp;[.B171]&amp;&quot; IS '&quot;&amp;SUBSTITUTE([.C17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2]&amp;&quot;.&quot;&amp;[.B172]&amp;&quot; IS '&quot;&amp;SUBSTITUTE([.C17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3]&amp;&quot;.&quot;&amp;[.B173]&amp;&quot; IS '&quot;&amp;SUBSTITUTE([.C17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4]&amp;&quot;.&quot;&amp;[.B174]&amp;&quot; IS '&quot;&amp;SUBSTITUTE([.C17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5]&amp;&quot;.&quot;&amp;[.B175]&amp;&quot; IS '&quot;&amp;SUBSTITUTE([.C17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6]&amp;&quot;.&quot;&amp;[.B176]&amp;&quot; IS '&quot;&amp;SUBSTITUTE([.C17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7]&amp;&quot;.&quot;&amp;[.B177]&amp;&quot; IS '&quot;&amp;SUBSTITUTE([.C17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8]&amp;&quot;.&quot;&amp;[.B178]&amp;&quot; IS '&quot;&amp;SUBSTITUTE([.C17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79]&amp;&quot;.&quot;&amp;[.B179]&amp;&quot; IS '&quot;&amp;SUBSTITUTE([.C17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0]&amp;&quot;.&quot;&amp;[.B180]&amp;&quot; IS '&quot;&amp;SUBSTITUTE([.C18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1]&amp;&quot;.&quot;&amp;[.B181]&amp;&quot; IS '&quot;&amp;SUBSTITUTE([.C18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2]&amp;&quot;.&quot;&amp;[.B182]&amp;&quot; IS '&quot;&amp;SUBSTITUTE([.C18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3]&amp;&quot;.&quot;&amp;[.B183]&amp;&quot; IS '&quot;&amp;SUBSTITUTE([.C18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4]&amp;&quot;.&quot;&amp;[.B184]&amp;&quot; IS '&quot;&amp;SUBSTITUTE([.C18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5]&amp;&quot;.&quot;&amp;[.B185]&amp;&quot; IS '&quot;&amp;SUBSTITUTE([.C18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6]&amp;&quot;.&quot;&amp;[.B186]&amp;&quot; IS '&quot;&amp;SUBSTITUTE([.C18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7]&amp;&quot;.&quot;&amp;[.B187]&amp;&quot; IS '&quot;&amp;SUBSTITUTE([.C18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8]&amp;&quot;.&quot;&amp;[.B188]&amp;&quot; IS '&quot;&amp;SUBSTITUTE([.C18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89]&amp;&quot;.&quot;&amp;[.B189]&amp;&quot; IS '&quot;&amp;SUBSTITUTE([.C18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0]&amp;&quot;.&quot;&amp;[.B190]&amp;&quot; IS '&quot;&amp;SUBSTITUTE([.C19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1]&amp;&quot;.&quot;&amp;[.B191]&amp;&quot; IS '&quot;&amp;SUBSTITUTE([.C191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2]&amp;&quot;.&quot;&amp;[.B192]&amp;&quot; IS '&quot;&amp;SUBSTITUTE([.C192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3]&amp;&quot;.&quot;&amp;[.B193]&amp;&quot; IS '&quot;&amp;SUBSTITUTE([.C193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4]&amp;&quot;.&quot;&amp;[.B194]&amp;&quot; IS '&quot;&amp;SUBSTITUTE([.C194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5]&amp;&quot;.&quot;&amp;[.B195]&amp;&quot; IS '&quot;&amp;SUBSTITUTE([.C195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6]&amp;&quot;.&quot;&amp;[.B196]&amp;&quot; IS '&quot;&amp;SUBSTITUTE([.C196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7]&amp;&quot;.&quot;&amp;[.B197]&amp;&quot; IS '&quot;&amp;SUBSTITUTE([.C197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8]&amp;&quot;.&quot;&amp;[.B198]&amp;&quot; IS '&quot;&amp;SUBSTITUTE([.C198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199]&amp;&quot;.&quot;&amp;[.B199]&amp;&quot; IS '&quot;&amp;SUBSTITUTE([.C199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00]&amp;&quot;.&quot;&amp;[.B200]&amp;&quot; IS '&quot;&amp;SUBSTITUTE([.C200]; &quot;'&quot;; &quot;''&quot;)&amp;&quot;';&quot;" office:value-type="string" office:string-value="COMMENT ON COLUMN . IS '';">
            <text:p>COMMENT ON COLUMN . IS '';</text:p>
          </table:table-cell>
        </table:table-row>
        <table:table-row table:style-name="ro1">
          <table:table-cell table:number-columns-repeated="3"/>
          <table:table-cell table:formula="of:=&quot;COMMENT ON COLUMN &quot;&amp;[.A201]&amp;&quot;.&quot;&amp;[.B201]&amp;&quot; IS '&quot;&amp;SUBSTITUTE([.C201]; &quot;'&quot;; &quot;''&quot;)&amp;&quot;';&quot;" office:value-type="string" office:string-value="COMMENT ON COLUMN . IS '';">
            <text:p>COMMENT ON COLUMN . IS ''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6">06/26/2026</text:date>, <text:time>18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6T20:57:17.35</meta:creation-date>
    <dc:date>2026-06-26T18:20:02.45</dc:date>
    <meta:editing-duration>PT2H21M26S</meta:editing-duration>
    <meta:editing-cycles>6</meta:editing-cycles>
    <meta:generator>OpenOffice/4.1.15$Win32 OpenOffice.org_project/4115m2$Build-9813</meta:generator>
    <meta:document-statistic meta:table-count="1" meta:cell-count="804" meta:object-count="0"/>
  </office:meta>
</office:document-meta>
</file>